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3">
            <text:p>LFO (Vibrato)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72"/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72"/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72"/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4"/>
          <table:table-cell table:style-name="ce21"/>
          <table:covered-table-cell table:number-columns-repeated="7" table:style-name="ce4"/>
        </table:table-row>
        <table:table-row table:style-name="ro1">
          <table:table-cell table:style-name="ce3">
            <text:p>Downloadable Sounds</text:p>
          </table:table-cell>
          <table:table-cell table:style-name="ce68">
            <text:p>Read</text:p>
          </table:table-cell>
          <table:table-cell table:style-name="ce10">
            <text:p>dls</text:p>
          </table:table-cell>
          <table:table-cell table:style-name="ce10">
            <text:p>dls</text:p>
          </table:table-cell>
          <table:table-cell table:style-name="ce72"/>
          <table:table-cell table:style-name="ce21">
            <text:p>8, 16</text:p>
          </table:table-cell>
          <table:table-cell table:style-name="ce10">
            <text:p>All</text:p>
          </table:table-cell>
          <table:table-cell table:style-name="ce4"/>
          <table:table-cell table:style-name="ce5"/>
          <table:table-cell table:style-name="ce10">
            <text:p>INFO: INAM</text:p>
          </table:table-cell>
          <table:table-cell table:style-name="ce21">
            <text:p>from description</text:p>
          </table:table-cell>
          <table:table-cell table:style-name="ce10">
            <text:p>INFO: IENG</text:p>
          </table:table-cell>
          <table:table-cell table:style-name="ce10">
            <text:p>INFO: ICRD</text:p>
          </table:table-cell>
          <table:table-cell table:style-name="ce10">
            <text:p>INFO: ISBJ / ICMT</text:p>
          </table:table-cell>
          <table:table-cell table:style-name="ce72"/>
          <table:table-cell table:style-name="ce81"/>
          <table:table-cell table:style-name="ce5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10">
            <text:p>wave link</text:p>
          </table:table-cell>
          <table:table-cell table:style-name="ce10">
            <text:p>usUnityNote</text:p>
          </table:table-cell>
          <table:table-cell table:style-name="ce10">
            <text:p>region key range</text:p>
          </table:table-cell>
          <table:table-cell table:style-name="ce72"/>
          <table:table-cell table:style-name="ce10">
            <text:p>region velocity range</text:p>
          </table:table-cell>
          <table:table-cell table:style-name="ce72"/>
          <table:table-cell table:style-name="ce72"/>
          <table:table-cell table:style-name="ce72"/>
          <table:table-cell table:style-name="ce10">
            <text:p>fine tune / pitch conn.</text:p>
          </table:table-cell>
          <table:table-cell table:style-name="ce72"/>
          <table:table-cell table:style-name="ce72"/>
          <table:table-cell table:style-name="ce10">
            <text:p>region gain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13">
            <text:p>usKeyGroup</text:p>
          </table:table-cell>
          <table:table-cell table:style-name="ce82"/>
          <table:table-cell table:style-name="ce5">
            <text:p>wsmp</text:p>
          </table:table-cell>
          <table:table-cell table:style-name="ce21">
            <text:p>forwards only</text:p>
          </table:table-cell>
          <table:table-cell table:style-name="ce72"/>
          <table:table-cell table:style-name="ce10">
            <text:p>loop start</text:p>
          </table:table-cell>
          <table:table-cell table:style-name="ce10">
            <text:p>loop length</text:p>
          </table:table-cell>
          <table:table-cell table:style-name="ce72"/>
          <table:table-cell table:style-name="ce72"/>
          <table:table-cell table:style-name="ce81"/>
          <table:table-cell table:style-name="ce5"/>
          <table:table-cell table:style-name="ce10">
            <text:p>EG1: delay, attack, hold,</text:p>
            <text:p>decay, sustain, release</text:p>
          </table:table-cell>
          <table:table-cell table:style-name="ce72"/>
          <table:table-cell table:style-name="ce10">
            <text:p>velocity -&gt; EG1</text:p>
          </table:table-cell>
          <table:table-cell table:style-name="ce13">
            <text:p>keynumber -&gt; gain</text:p>
          </table:table-cell>
          <table:table-cell table:style-name="ce72"/>
          <table:table-cell table:style-name="ce4"/>
          <table:table-cell table:style-name="ce5"/>
          <table:table-cell table:style-name="ce10">
            <text:p>pitchwheel -&gt; pitch</text:p>
          </table:table-cell>
          <table:table-cell table:style-name="ce10">
            <text:p>pitchwheel -&gt; pitch</text:p>
          </table:table-cell>
          <table:table-cell table:style-name="ce10">
            <text:p>EG2 -&gt; pitch</text:p>
          </table:table-cell>
          <table:table-cell table:style-name="ce13">
            <text:p>LFO -&gt; pitch</text:p>
            <text:p>(Hz, delay, depth)</text:p>
          </table:table-cell>
          <table:table-cell table:style-name="ce4"/>
          <table:table-cell table:style-name="ce2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 +</text:p>
            <text:p>layer velocity window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V segment (3 attack,</text:p>
            <text:p>decay, 3 release stages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F1 page: low-pass, high-pass,</text:p>
            <text:p>bandpass, notch</text:p>
          </table:table-cell>
          <table:table-cell table:style-name="ce13" office:value-type="string" calcext:value-type="string" table:number-columns-spanned="1" table:number-rows-spanned="2">
            <text:p>1 / 2 / 4</text:p>
          </table:table-cell>
          <table:table-cell table:style-name="ce13" office:value-type="string" calcext:value-type="string" table:number-columns-spanned="1" table:number-rows-spanned="2">
            <text:p>F1 frequency</text:p>
            <text:p>(16Hz - 25kHz)</text:p>
          </table:table-cell>
          <table:table-cell table:style-name="ce13" office:value-type="string" calcext:value-type="string" table:number-columns-spanned="1" table:number-rows-spanned="2">
            <text:p>F2 resonance (0-24dB)</text:p>
          </table:table-cell>
          <table:table-cell table:style-name="ce13" office:value-type="string" calcext:value-type="string" table:number-columns-spanned="1" table:number-rows-spanned="2">
            <text:p>ENV2 segment + depth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9" office:value-type="string" calcext:value-type="string">
            <text:p>Global only</text:p>
          </table:table-cell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72"/>
          <table:table-cell table:style-name="ce87"/>
          <table:table-cell table:style-name="ce79" office:value-type="string" calcext:value-type="string">
            <text:p>Global only</text:p>
          </table:table-cell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72"/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72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72"/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72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13">
            <text:p>pitchlfo_freq, pitchlfo_depth,</text:p>
            <text:p>pitchlfo_delay, pitchlfo_fad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13">
            <text:p>pitchlfo_freq, pitchlfo_depth,</text:p>
            <text:p>pitchlfo_delay, pitchlfo_fade</text:p>
          </table:table-cell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72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52"/>
          <table:table-cell table:style-name="ce72"/>
          <table:table-cell table:number-columns-repeated="9"/>
          <table:table-cell table:style-name="ce67" table:number-columns-repeated="16316"/>
        </table:table-row>
        <table:table-row table:style-name="ro7" table:number-rows-repeated="1048496">
          <table:table-cell table:number-columns-repeated="59"/>
          <table:table-cell table:style-name="ce72"/>
          <table:table-cell table:number-columns-repeated="9"/>
          <table:table-cell table:style-name="ce67" table:number-columns-repeated="16316"/>
        </table:table-row>
        <table:table-row table:style-name="ro7">
          <table:table-cell table:number-columns-repeated="59"/>
          <table:table-cell table:style-name="ce72"/>
          <table:table-cell table:number-columns-repeated="9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